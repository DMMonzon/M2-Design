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d34" officeooo:paragraph-rsid="000aa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<text:line-break/>Volanta: ¿Estás listo para que tu marca se llene de color y energía?<text:line-break/>Título: Explora cómo transformo tus ideas en diseños impactantes y memorables.</text:p>
      <text:p text:style-name="P1"/>
      <text:p text:style-name="P1">BRANDING<text:line-break/>Título: Transformemos tu marca en una gran historia visual.<text:line-break/>Copete: ¿Listo para darle a tu marca una nueva y cautivadora narrativa visual? Compárteme tu historia, y juntos crearemos un branding que refleje tu esencia y conecte con tu público.<text:line-break/><text:line-break/>WEB<text:line-break/>Título: Experiencias web que cautivan y convierten.<text:line-break/>Copete: Transformemos tu presencia online en una experiencia inolvidable. Creemos sitios web intuitivos y atractivos que impacten a tu audiencia y generen resultados reales.<text:line-break/><text:line-break/>TEXTIL<text:line-break/>Título: Diseño de indumentaria que comunica e impacta.<text:line-break/>Copete: Desarrollo diseños para equipos deportivos y empresas, creando prendas con estilo propio. Mi objetivo es que cada trbajo comunique la esencia de la marca y genere un impacto positivo.<text:line-break/><text:line-break/>GRAFICA<text:line-break/>Título: Narrativa visual en papel con atención al detalle.<text:line-break/>Copete: Material impreso que se adapta a las necesidades y preferencias de cada público: revistas con contenido especializado, banners publicitarios, flyers de interés y mucho más.<text:line-break/><text:line-break/>MEDIA<text:line-break/>Título: Producción multimedia creativa y con pasión.<text:line-break/>Copete: Generemos juntos videos promocionales y corporativos que cautiven a la audiencia y transmitan la esencia del evento, como <text:s/>presentaciones multimedia o contenido para pantallas LED.</text:p>
      <text:p text:style-name="P1"/>
      <text:p text:style-name="P1">CONTACTO<text:line-break/>Título: Hagamos realidad tu idea. ¡Contáctame!<text:line-break/>Copete: Tú tienes una idea increíble, y yo las herramientas para hacerla crecer. Cuéntame sobre ella, compartamos nuestras visiones, y construyamos juntos un proyecto del que estemos orgullos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9T14:00:15.632499000</meta:creation-date>
    <dc:date>2026-07-09T14:04:20.733099200</dc:date>
    <meta:editing-duration>PT4M6S</meta:editing-duration>
    <meta:editing-cycles>1</meta:editing-cycles>
    <meta:document-statistic meta:table-count="0" meta:image-count="0" meta:object-count="0" meta:page-count="1" meta:paragraph-count="3" meta:word-count="241" meta:character-count="1637" meta:non-whitespace-character-count="1394"/>
    <meta:generator>LibreOffice/25.8.7.3$Windows_X86_64 LibreOffice_project/30742500f2d3eb4366ac312fa33d3dcabdb3eba5</meta:generator>
  </office:meta>
</office:document-meta>
</file>